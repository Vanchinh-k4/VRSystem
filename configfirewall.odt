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e62" officeooo:paragraph-rsid="0019b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ỉnh wpa</text:h>
      <text:p text:style-name="Standard">sudo nano /media/chinh/rootfs/etc/wpa_supplicant/wpa_supplicant.conf</text:p>
      <text:p text:style-name="Standard"/>
      <text:p text:style-name="Standard">sudo sync</text:p>
      <text:p text:style-name="Standard">sudo umount /media/chinh/bootfs</text:p>
      <text:p text:style-name="Standard">sudo umount /media/chinh/rootfs</text:p>
      <text:p text:style-name="Standard"/>
      <text:p text:style-name="Standard"/>
      <text:h text:style-name="Heading_20_1" text:outline-level="1">Quét ip</text:h>
      <text:p text:style-name="Standard">sudo nmap -sn 192.168.1.0/24</text:p>
      <text:p text:style-name="Standard"/>
      <text:p text:style-name="Standard"/>
      <text:p text:style-name="P1">Cho phép truy cập qua tường lửa</text:p>
      <text:p text:style-name="Standard">sudo ufw allow 22/tcp</text:p>
      <text:p text:style-name="Standard"/>
      <text:p text:style-name="Standard">Chặn</text:p>
      <text:p text:style-name="Standard">sudo ufw deny 22/tcp</text:p>
      <text:p text:style-name="Standard"/>
      <text:p text:style-name="Standard"/>
      <text:p text:style-name="Standard">Xem trạng thái</text:p>
      <text:p text:style-name="Standard">sudo ufw status verbo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8T22:59:35.036683269</meta:creation-date>
    <dc:date>2025-12-09T01:00:58.982462048</dc:date>
    <meta:editing-duration>PT20M53S</meta:editing-duration>
    <meta:editing-cycles>1</meta:editing-cycles>
    <meta:document-statistic meta:table-count="0" meta:image-count="0" meta:object-count="0" meta:page-count="1" meta:paragraph-count="13" meta:word-count="42" meta:character-count="296" meta:non-whitespace-character-count="267"/>
    <meta:generator>LibreOffice/6.4.7.2$Linux_X86_64 LibreOffice_project/40$Build-2</meta:generator>
  </office:meta>
</office:document-meta>
</file>