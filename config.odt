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efcf9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loext:contextual-spacing="false" style:writing-mode="lr-tb"/>
    </style:style>
    <style:style style:name="P4" style:family="paragraph" style:parent-style-name="Standard">
      <style:text-properties officeooo:rsid="001e1d7a" officeooo:paragraph-rsid="001e1d7a"/>
    </style:style>
    <style:style style:name="P5" style:family="paragraph" style:parent-style-name="Heading_20_2" style:list-style-name="L1"/>
    <style:style style:name="P6" style:family="paragraph" style:parent-style-name="Heading_20_3">
      <style:text-properties fo:font-weight="normal" style:font-weight-asian="normal" style:font-weight-complex="normal"/>
    </style:style>
    <style:style style:name="P7" style:family="paragraph" style:parent-style-name="Text_20_body" style:list-style-name="L2"/>
    <style:style style:name="T1" style:family="text">
      <style:text-properties officeooo:rsid="001e1d7a"/>
    </style:style>
    <style:style style:name="T2" style:family="text">
      <style:text-properties officeooo:rsid="00204ede"/>
    </style:style>
    <style:style style:name="T3" style:family="text">
      <style:text-properties officeooo:rsid="00238683"/>
    </style:style>
    <style:style style:name="T4" style:family="text">
      <style:text-properties officeooo:rsid="00248802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lient:</text:p>
      <text:h text:style-name="Heading_20_2" text:outline-level="2">Uploads file len server</text:h>
      <text:p text:style-name="Standard">- <text:span text:style-name="T1">cd uploads</text:span></text:p>
      <text:p text:style-name="Standard">-<text:span text:style-name="T1">put file.txt: upload file</text:span></text:p>
      <text:h text:style-name="Heading_20_2" text:outline-level="2">Tải file về từ server</text:h>
      <text:p text:style-name="Standard">-<text:span text:style-name="T1">get file.txt </text:span><text:span text:style-name="T2">file_</text:span><text:span text:style-name="T1">downloaded.txt: </text:span></text:p>
      <text:p text:style-name="Standard"/>
      <text:h text:style-name="Heading_20_2" text:outline-level="2">Tạo thư mục mới trên server</text:h>
      <text:p text:style-name="P2"><text:span text:style-name="Source_20_Text">sftp&gt; mkdir data</text:span></text:p>
      <text:p text:style-name="P3"><text:span text:style-name="Source_20_Text">sftp&gt; ls</text:span></text:p>
      <text:p text:style-name="Text_20_body"><text:span text:style-name="Emphasis">Kết quả expected:</text:span> hiện thư mục <text:span text:style-name="Source_20_Text">data</text:span>.</text:p>
      <text:h text:style-name="Heading_20_2" text:outline-level="2">Đổi tên file</text:h>
      <text:p text:style-name="P2"><text:span text:style-name="Source_20_Text">sftp&gt; rename demo.txt demo_new.txt</text:span></text:p>
      <text:p text:style-name="P3"><text:span text:style-name="Source_20_Text">sftp&gt; ls</text:span></text:p>
      <text:h text:style-name="Heading_20_2" text:outline-level="2">Xóa file</text:h>
      <text:p text:style-name="P2"><text:span text:style-name="Source_20_Text">sftp&gt; rm demo_new.txt</text:span></text:p>
      <text:p text:style-name="P3"><text:span text:style-name="Source_20_Text">sftp&gt; ls</text:span></text:p>
      <text:p text:style-name="Text_20_body">chứng minh SFTP <text:span text:style-name="Strong_20_Emphasis">cho phép thao tác file system</text:span> đầy đủ nhưng vẫn trong vùng chroot an toàn.</text:p>
      <text:p text:style-name="Standard"/>
      <text:p text:style-name="Standard">Kiểm tra cơ chế “nhốt user” (chroot jail)</text:p>
      <text:p text:style-name="Standard">sftp&gt; cd /</text:p>
      <text:p text:style-name="Standard">sftp&gt; pwd</text:p>
      <text:p text:style-name="Standard"/>
      <text:p text:style-name="Standard"/>
      <text:h text:style-name="Heading_20_2" text:outline-level="2">Upload nhiều file cùng lúc bằng wildcard (<text:span text:style-name="Source_20_Text">*</text:span>)</text:h>
      <text:p text:style-name="Standard">sftp&gt; put *.txt</text:p>
      <text:p text:style-name="Standard"/>
      <text:p text:style-name="Standard"/>
      <text:p text:style-name="Standard"/>
      <text:p text:style-name="P4">Server:</text:p>
      <text:h text:style-name="P1" text:outline-level="2">Kiem tra file trong thu muc uploads: </text:h>
      <text:h text:style-name="P6" text:outline-level="3">ls -l /srv/sftp/uploads</text:h>
      <text:h text:style-name="Heading_20_2" text:outline-level="2">Xem thông tin trên server:</text:h>
      <text:p text:style-name="P4">sudo tail -f /var/log/auth.log</text:p>
      <text:p text:style-name="P4"><text:soft-page-break/></text:p>
      <text:list xml:id="list1185154445" text:style-name="L1">
        <text:list-item>
          <text:list>
            <text:list-item>
              <text:h text:style-name="P5" text:outline-level="2">Restart SSH:</text:h>
            </text:list-item>
          </text:list>
        </text:list-item>
      </text:list>
      <text:p text:style-name="Text_20_body"><text:span text:style-name="Source_20_Text">sudo systemctl restart ssh</text:span></text:p>
      <text:p text:style-name="Text_20_body"><text:span text:style-name="Source_20_Text">sudo mkdir -p /srv/sftp/sftpuser2/uploads</text:span></text:p>
      <text:p text:style-name="Text_20_body"><text:span text:style-name="Source_20_Text">sudo chown root:root /srv/sftp/sftpuser</text:span><text:span text:style-name="Source_20_Text"><text:span text:style-name="T3">2</text:span></text:span></text:p>
      <text:p text:style-name="Text_20_body"><text:span text:style-name="Source_20_Text">sudo chmod 755 /srv/sftp/sftpuser2</text:span></text:p>
      <text:p text:style-name="Text_20_body"><text:span text:style-name="Source_20_Text">sudo chown sftpuser2:sftpuser2 /srv/sftp/sftpuser2/uploads</text:span></text:p>
      <text:p text:style-name="Text_20_body"><text:span text:style-name="Source_20_Text">sudo chmod 700 /srv/sftp/sftpuser2/uploads</text:span></text:p>
      <text:h text:style-name="Heading_20_2" text:outline-level="2"><text:span text:style-name="Strong_20_Emphasis">Bước 4: Chỉnh sửa SSHD config</text:span></text:h>
      <text:p text:style-name="Text_20_body">Mở file:</text:p>
      <text:p text:style-name="P3"><text:span text:style-name="Source_20_Text">sudo nano /etc/ssh/sshd_config</text:span></text:p>
      <text:p text:style-name="Text_20_body">Thêm vào cuối file:</text:p>
      <text:p text:style-name="P2"><text:span text:style-name="Source_20_Text">Match User sftpuser1</text:span></text:p>
      <text:p text:style-name="P2"><text:span text:style-name="Source_20_Text"><text:s text:c="4"/>ChrootDirectory /srv/sftp</text:span></text:p>
      <text:p text:style-name="P2"><text:span text:style-name="Source_20_Text"><text:s text:c="4"/>ForceCommand internal-sftp</text:span></text:p>
      <text:p text:style-name="P2"><text:span text:style-name="Source_20_Text"><text:s text:c="4"/>X11Forwarding no</text:span></text:p>
      <text:p text:style-name="P3"><text:span text:style-name="Source_20_Text"><text:s text:c="4"/>AllowTcpForwarding no</text:span></text:p>
      <text:list xml:id="list3453939815" text:style-name="L2">
        <text:list-item>
          <text:p text:style-name="P7"><text:span text:style-name="Source_20_Text">ChrootDirectory</text:span> → thư mục root ảo cho SFTP user</text:p>
        </text:list-item>
        <text:list-item>
          <text:p text:style-name="P7"><text:span text:style-name="Source_20_Text">ForceCommand internal-sftp</text:span> → chỉ cho phép SFTP, không cho shell</text:p>
        </text:list-item>
        <text:list-item>
          <text:p text:style-name="P7"><text:span text:style-name="Source_20_Text">X11Forwarding</text:span> + <text:span text:style-name="Source_20_Text">AllowTcpForwarding</text:span> → tắt tính năng không cần thiết</text:p>
        </text:list-item>
      </text:list>
      <text:p text:style-name="Horizontal_20_Line"/>
      <text:h text:style-name="Heading_20_2" text:outline-level="2"><text:span text:style-name="Strong_20_Emphasis">Bước 5: Restart SSH</text:span></text:h>
      <text:p text:style-name="Text_20_body"><text:span text:style-name="Source_20_Text">sudo systemctl restart ssh</text:span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h text:style-name="Heading_20_2" text:outline-level="2"><text:soft-page-break/><text:span text:style-name="Source_20_Text">Các thao tác trên server có chroot</text:span></text:h>
      <text:h text:style-name="Heading_20_2" text:outline-level="2"><text:span text:style-name="Source_20_Text">🟦 </text:span><text:span text:style-name="Source_20_Text"><text:span text:style-name="Strong_20_Emphasis">1. ĐỔI TÊN FILE (rename)</text:span></text:span></text:h>
      <text:p text:style-name="Text_20_body"><text:span text:style-name="Source_20_Text">sudo mv /srv/sftp/</text:span><text:span text:style-name="Source_20_Text"><text:span text:style-name="T4">sftpuser2</text:span></text:span><text:span text:style-name="Source_20_Text">/uploads/upload.txt /srv/sftp/</text:span><text:span text:style-name="Source_20_Text"><text:span text:style-name="T4">sftpuser2</text:span></text:span><text:span text:style-name="Source_20_Text">/uploads/data.txt</text:span></text:p>
      <text:p text:style-name="Text_20_body"><text:span text:style-name="Source_20_Text"/></text:p>
      <text:h text:style-name="Heading_20_2" text:outline-level="2"><text:span text:style-name="Source_20_Text">🟥 </text:span><text:span text:style-name="Source_20_Text"><text:span text:style-name="Strong_20_Emphasis">2. XÓA FILE (delete)</text:span></text:span></text:h>
      <text:p text:style-name="Text_20_body"><text:span text:style-name="Source_20_Text">sudo rm /srv/sftp/</text:span><text:span text:style-name="Source_20_Text"><text:span text:style-name="T4">sftpuser2</text:span></text:span><text:span text:style-name="Source_20_Text">/uploads/data.txt</text:span></text:p>
      <text:h text:style-name="Heading_20_2" text:outline-level="2"><text:span text:style-name="Source_20_Text">🟩 </text:span><text:span text:style-name="Source_20_Text"><text:span text:style-name="Strong_20_Emphasis">3. SỬA / ĐỔI NỘI DUNG FILE</text:span></text:span></text:h>
      <text:p text:style-name="Text_20_body"><text:span text:style-name="Source_20_Text">sudo nano /srv/sftp/sftpuser2/uploads/upload.txt</text:span></text:p>
      <text:h text:style-name="Heading_20_2" text:outline-level="2"><text:span text:style-name="Source_20_Text">🟨 </text:span><text:span text:style-name="Source_20_Text"><text:span text:style-name="Strong_20_Emphasis">4. Kiểm tra danh sách file sau khi thao tác</text:span></text:span></text:h>
      <text:p text:style-name="Text_20_body"><text:span text:style-name="Source_20_Text">sudo ls -l /srv/sftp/sftpuser2/uploads</text:span></text:p>
      <text:p text:style-name="Text_20_body"><text:span text:style-name="Source_20_Text"/></text:p>
      <text:h text:style-name="Heading_20_1" text:outline-level="1"><text:span text:style-name="Strong_20_Emphasis">5. Kiểm tra nội dung file</text:span></text:h>
      <text:p text:style-name="Text_20_body"><text:span text:style-name="Source_20_Text">sudo cat /srv/sftp/</text:span><text:span text:style-name="Source_20_Text"><text:span text:style-name="T4">sftpuser2</text:span></text:span><text:span text:style-name="Source_20_Text">/uploads/data.txt </text:span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h text:style-name="Heading_20_2" text:outline-level="2"><text:span text:style-name="Source_20_Text">Mở file cấu hình chroot</text:span></text:h>
      <text:p text:style-name="Text_20_body"><text:span text:style-name="Source_20_Text">sudo nano /etc/ssh/sshd_config</text:span></text:p>
      <text:p text:style-name="Text_20_body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2-02T12:20:56.340842538</meta:creation-date>
    <meta:editing-duration>PT1H14M9S</meta:editing-duration>
    <meta:editing-cycles>4</meta:editing-cycles>
    <meta:generator>LibreOffice/6.4.7.2$Linux_X86_64 LibreOffice_project/40$Build-2</meta:generator>
    <dc:date>2025-12-05T03:21:34.669463039</dc:date>
    <meta:document-statistic meta:table-count="0" meta:image-count="0" meta:object-count="0" meta:page-count="3" meta:paragraph-count="61" meta:word-count="277" meta:character-count="1813" meta:non-whitespace-character-count="1582"/>
  </office:meta>
</office:document-meta>
</file>